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language="es" fo:country="MX"/>
    </style:style>
    <style:style style:name="P2" style:family="paragraph" style:parent-style-name="Text_20_body" style:list-style-name="L1">
      <style:paragraph-properties fo:margin-top="0in" fo:margin-bottom="0in" style:contextual-spacing="false"/>
      <style:text-properties fo:language="es" fo:country="MX"/>
    </style:style>
    <style:style style:name="P3" style:family="paragraph" style:parent-style-name="Text_20_body" style:list-style-name="L1">
      <style:paragraph-properties fo:margin-top="0in" fo:margin-bottom="0in" style:contextual-spacing="false"/>
      <style:text-properties fo:language="es" fo:country="MX" officeooo:rsid="0005d5a1" officeooo:paragraph-rsid="0005d5a1"/>
    </style:style>
    <style:style style:name="P4" style:family="paragraph" style:parent-style-name="Text_20_body" style:list-style-name="L1">
      <style:text-properties fo:language="es" fo:country="MX"/>
    </style:style>
    <style:style style:name="P5" style:family="paragraph" style:parent-style-name="Text_20_body" style:list-style-name="L1">
      <style:text-properties fo:language="es" fo:country="MX" officeooo:rsid="00079428" officeooo:paragraph-rsid="00079428"/>
    </style:style>
    <style:style style:name="P6" style:family="paragraph" style:parent-style-name="Text_20_body" style:list-style-name="L2">
      <style:paragraph-properties fo:margin-top="0in" fo:margin-bottom="0in" style:contextual-spacing="false"/>
      <style:text-properties fo:language="es" fo:country="MX" officeooo:paragraph-rsid="00079428"/>
    </style:style>
    <style:style style:name="P7" style:family="paragraph" style:parent-style-name="Text_20_body" style:list-style-name="L2">
      <style:paragraph-properties fo:margin-top="0in" fo:margin-bottom="0in" style:contextual-spacing="false"/>
      <style:text-properties fo:language="es" fo:country="MX"/>
    </style:style>
    <style:style style:name="P8" style:family="paragraph" style:parent-style-name="Text_20_body" style:list-style-name="L2">
      <style:paragraph-properties fo:margin-top="0in" fo:margin-bottom="0in" style:contextual-spacing="false"/>
      <style:text-properties fo:language="es" fo:country="MX" officeooo:rsid="00079428" officeooo:paragraph-rsid="00079428"/>
    </style:style>
    <style:style style:name="P9" style:family="paragraph" style:parent-style-name="Text_20_body" style:list-style-name="L2">
      <style:text-properties fo:language="es" fo:country="MX"/>
    </style:style>
    <style:style style:name="P10" style:family="paragraph" style:parent-style-name="Text_20_body" style:list-style-name="L2">
      <style:text-properties fo:language="es" fo:country="MX" officeooo:rsid="00079428" officeooo:paragraph-rsid="00079428"/>
    </style:style>
    <style:style style:name="P11" style:family="paragraph" style:parent-style-name="Text_20_body" style:list-style-name="L3">
      <style:paragraph-properties fo:margin-top="0in" fo:margin-bottom="0in" style:contextual-spacing="false"/>
      <style:text-properties fo:language="es" fo:country="MX"/>
    </style:style>
    <style:style style:name="P12" style:family="paragraph" style:parent-style-name="Text_20_body" style:list-style-name="L3">
      <style:text-properties fo:language="es" fo:country="MX"/>
    </style:style>
    <style:style style:name="P13" style:family="paragraph" style:parent-style-name="Text_20_body" style:list-style-name="L4">
      <style:paragraph-properties fo:margin-top="0in" fo:margin-bottom="0in" style:contextual-spacing="false"/>
      <style:text-properties fo:language="es" fo:country="MX"/>
    </style:style>
    <style:style style:name="P14" style:family="paragraph" style:parent-style-name="Text_20_body" style:list-style-name="L4">
      <style:text-properties fo:language="es" fo:country="MX"/>
    </style:style>
    <style:style style:name="P15" style:family="paragraph" style:parent-style-name="Text_20_body" style:list-style-name="L5">
      <style:paragraph-properties fo:margin-top="0in" fo:margin-bottom="0in" style:contextual-spacing="false"/>
      <style:text-properties fo:language="es" fo:country="MX"/>
    </style:style>
    <style:style style:name="P16" style:family="paragraph" style:parent-style-name="Text_20_body" style:list-style-name="L5">
      <style:text-properties fo:language="es" fo:country="MX"/>
    </style:style>
    <style:style style:name="P17" style:family="paragraph" style:parent-style-name="Text_20_body" style:list-style-name="L6">
      <style:text-properties fo:language="es" fo:country="MX"/>
    </style:style>
    <style:style style:name="P18" style:family="paragraph" style:parent-style-name="Text_20_body">
      <style:text-properties fo:language="es" fo:country="MX"/>
    </style:style>
    <style:style style:name="P19" style:family="paragraph" style:parent-style-name="Text_20_body">
      <style:text-properties fo:language="es" fo:country="MX" officeooo:rsid="0007f8d0" officeooo:paragraph-rsid="0007f8d0"/>
    </style:style>
    <style:style style:name="P20" style:family="paragraph" style:parent-style-name="Text_20_body" style:list-style-name="L7">
      <style:paragraph-properties fo:margin-top="0in" fo:margin-bottom="0in" style:contextual-spacing="false"/>
      <style:text-properties fo:language="es" fo:country="MX"/>
    </style:style>
    <style:style style:name="P21" style:family="paragraph" style:parent-style-name="Text_20_body" style:list-style-name="L7"/>
    <style:style style:name="P22" style:family="paragraph" style:parent-style-name="Text_20_body" style:list-style-name="L8">
      <style:paragraph-properties fo:margin-top="0in" fo:margin-bottom="0in" style:contextual-spacing="false"/>
      <style:text-properties fo:language="es" fo:country="MX"/>
    </style:style>
    <style:style style:name="P23" style:family="paragraph" style:parent-style-name="Text_20_body" style:list-style-name="L8">
      <style:text-properties fo:language="es" fo:country="MX"/>
    </style:style>
    <style:style style:name="P24" style:family="paragraph" style:parent-style-name="Text_20_body" style:list-style-name="L9">
      <style:paragraph-properties fo:margin-top="0in" fo:margin-bottom="0in" style:contextual-spacing="false"/>
      <style:text-properties fo:language="es" fo:country="MX"/>
    </style:style>
    <style:style style:name="P25" style:family="paragraph" style:parent-style-name="Text_20_body" style:list-style-name="L9">
      <style:text-properties fo:language="es" fo:country="MX"/>
    </style:style>
    <style:style style:name="P26" style:family="paragraph" style:parent-style-name="Text_20_body" style:list-style-name="L10">
      <style:paragraph-properties fo:margin-top="0in" fo:margin-bottom="0in" style:contextual-spacing="false"/>
      <style:text-properties fo:language="es" fo:country="MX"/>
    </style:style>
    <style:style style:name="P27" style:family="paragraph" style:parent-style-name="Text_20_body" style:list-style-name="L10">
      <style:text-properties fo:language="es" fo:country="MX"/>
    </style:style>
    <style:style style:name="P28" style:family="paragraph" style:parent-style-name="Text_20_body" style:list-style-name="L11">
      <style:paragraph-properties fo:margin-top="0in" fo:margin-bottom="0in" style:contextual-spacing="false"/>
      <style:text-properties fo:language="es" fo:country="MX"/>
    </style:style>
    <style:style style:name="P29" style:family="paragraph" style:parent-style-name="Text_20_body" style:list-style-name="L11">
      <style:text-properties fo:language="es" fo:country="MX"/>
    </style:style>
    <style:style style:name="P30" style:family="paragraph" style:parent-style-name="Text_20_body" style:list-style-name="L11">
      <style:text-properties fo:language="es" fo:country="MX" officeooo:rsid="000abb6b" officeooo:paragraph-rsid="000abb6b"/>
    </style:style>
    <style:style style:name="P31" style:family="paragraph" style:parent-style-name="Text_20_body" style:list-style-name="L12">
      <style:paragraph-properties fo:margin-top="0in" fo:margin-bottom="0in" style:contextual-spacing="false"/>
    </style:style>
    <style:style style:name="P32" style:family="paragraph" style:parent-style-name="Text_20_body" style:list-style-name="L13">
      <style:paragraph-properties fo:margin-top="0in" fo:margin-bottom="0in" style:contextual-spacing="false"/>
    </style:style>
    <style:style style:name="P33" style:family="paragraph" style:parent-style-name="Text_20_body" style:list-style-name="L14">
      <style:paragraph-properties fo:margin-top="0in" fo:margin-bottom="0in" style:contextual-spacing="false"/>
      <style:text-properties officeooo:paragraph-rsid="000abb6b"/>
    </style:style>
    <style:style style:name="P34" style:family="paragraph" style:parent-style-name="Text_20_body" style:list-style-name="L15">
      <style:paragraph-properties fo:margin-top="0in" fo:margin-bottom="0in" style:contextual-spacing="false"/>
      <style:text-properties officeooo:paragraph-rsid="000abb6b"/>
    </style:style>
    <style:style style:name="P35" style:family="paragraph" style:parent-style-name="Text_20_body" style:list-style-name="L16">
      <style:paragraph-properties fo:margin-top="0in" fo:margin-bottom="0in" style:contextual-spacing="false"/>
    </style:style>
    <style:style style:name="P36" style:family="paragraph" style:parent-style-name="Text_20_body" style:list-style-name="L17">
      <style:paragraph-properties fo:margin-top="0in" fo:margin-bottom="0in" style:contextual-spacing="false"/>
    </style:style>
    <style:style style:name="P37" style:family="paragraph" style:parent-style-name="Text_20_body" style:list-style-name="L18">
      <style:paragraph-properties fo:margin-top="0in" fo:margin-bottom="0in" style:contextual-spacing="false"/>
    </style:style>
    <style:style style:name="P38" style:family="paragraph" style:parent-style-name="Text_20_body" style:list-style-name="L19">
      <style:paragraph-properties fo:margin-top="0in" fo:margin-bottom="0in" style:contextual-spacing="false"/>
    </style:style>
    <style:style style:name="P39" style:family="paragraph" style:parent-style-name="Text_20_body" style:list-style-name="L20"/>
    <style:style style:name="P40" style:family="paragraph" style:parent-style-name="Standard">
      <style:text-properties fo:language="es" fo:country="MX"/>
    </style:style>
    <style:style style:name="T1" style:family="text">
      <style:text-properties officeooo:rsid="0005d5a1"/>
    </style:style>
    <style:style style:name="T2" style:family="text">
      <style:text-properties officeooo:rsid="00079428"/>
    </style:style>
    <style:style style:name="T3" style:family="text">
      <style:text-properties officeooo:rsid="0007f8d0"/>
    </style:style>
    <style:style style:name="T4" style:family="text">
      <style:text-properties fo:language="es" fo:country="MX"/>
    </style:style>
    <style:style style:name="T5" style:family="text">
      <style:text-properties fo:language="es" fo:country="MX" officeooo:rsid="0007f8d0"/>
    </style:style>
    <style:style style:name="T6" style:family="text">
      <style:text-properties officeooo:rsid="00094a50"/>
    </style:style>
    <style:style style:name="T7" style:family="text">
      <style:text-properties officeooo:rsid="000abb6b"/>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2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3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3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4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1. Objetivo general de tus clases</text:h>
      <text:list text:style-name="L1">
        <text:list-item>
          <text:p text:style-name="P2">¿Cómo describirías en una frase lo que enseñas actualmente?<text:line-break/><text:span text:style-name="T1">Le enseño a profesionales y no profesionales a usar las IAs de manera profesional y completa. La mayoría no tiene idea de lo poderosas que son incluso las versiones gratuitas.</text:span></text:p>
        </text:list-item>
        <text:list-item>
          <text:p text:style-name="P2">¿Cuál es el resultado que quieres que obtenga un alumno después de tomar clases contigo? </text:p>
          <text:p text:style-name="P3">Que no solo pueda usar el potencial completo de las IAs, sino que ya no dependa de mí ni de nadie para aprender nuevas habilidades usando exactamente lo mismo que aprendió conmigo</text:p>
        </text:list-item>
        <text:list-item>
          <text:p text:style-name="P2">¿Quieres que tus clases sean más bien:<text:line-break/>e) una mezcla, <text:span text:style-name="T2">tengo que poder adaptarme a cada individuo o grupo.</text:span></text:p>
        </text:list-item>
        <text:list-item>
          <text:p text:style-name="P4">¿Qué te gustaría vender en el futuro: clases individuales, paquetes, curso grabado, membresía, asesoría empresarial, talleres grupales? </text:p>
          <text:p text:style-name="P5">La verdad a futuro no creo que haya mucho mercado de estas clases. Veo venir la mejoría de los sistemas y las nuevas generaciones van a estar totalmente familiarizadas con ellas.</text:p>
        </text:list-item>
      </text:list>
      <text:h text:style-name="P1" text:outline-level="2">2. Perfil de tus alumnos actuales</text:h>
      <text:list text:style-name="L2">
        <text:list-item>
          <text:p text:style-name="P6">¿Quiénes están tomando clases contigo ahora?</text:p>
          <text:p text:style-name="P6"><text:span text:style-name="T2">Todas las edades, todas las profesiones o estudios, normalmente clase media alta y nivel tecnológico mínimo o nulo, por eso las clases.</text:span><text:line-break/></text:p>
        </text:list-item>
        <text:list-item>
          <text:p text:style-name="P7">¿Qué tipo de problemas quieren resolver con IA? </text:p>
          <text:p text:style-name="P8">Me tengo que adaptar a cada clase, por lo que necesito que el sistema pueda registrar todo lo que hacemos y sugerir nuevas ideas</text:p>
        </text:list-item>
        <text:list-item>
          <text:p text:style-name="P7">¿Llegan con miedo, curiosidad, urgencia, resistencia, entusiasmo? </text:p>
          <text:p text:style-name="P8">De todo un poco</text:p>
        </text:list-item>
        <text:list-item>
          <text:p text:style-name="P7">¿Qué tanto saben usar computadora, celular, Google Drive, ChatGPT, etc.? </text:p>
          <text:p text:style-name="P8">Normalmente eso sí lo saben, aunque ya la terminal o programar casi nunca</text:p>
        </text:list-item>
        <text:list-item>
          <text:p text:style-name="P9">¿Qué diferencia hay entre tus alumnos más fáciles y los más difíciles? </text:p>
          <text:p text:style-name="P10">No mucha, curiosamente. Una vez que comienzan a usar las IAs los pica el virus generalmente pronto y se emocionan como yo</text:p>
        </text:list-item>
      </text:list>
      <text:h text:style-name="P1" text:outline-level="2">3. Cómo estás dando las clases actualmente</text:h>
      <text:list text:style-name="L3">
        <text:list-item>
          <text:p text:style-name="P11">¿Las clases son presenciales, por Zoom, por videollamada, en casa del alumno, en tu estudio, mixtas? <text:span text:style-name="T2">Mixtas</text:span></text:p>
        </text:list-item>
        <text:list-item>
          <text:p text:style-name="P11">¿Cuánto dura cada clase? <text:span text:style-name="T2">2 horas aprox</text:span></text:p>
        </text:list-item>
        <text:list-item>
          <text:p text:style-name="P11">¿Cuántas clases suele tomar una persona contigo? <text:span text:style-name="T2">Los alumnos del taller una cada semana, indefinido. Las externas no lo sé, mi primer cliente lleva 3 y seguimos</text:span></text:p>
        </text:list-item>
        <text:list-item>
          <text:p text:style-name="P11">¿Cobras por hora, por paquete o por proyecto? <text:span text:style-name="T2">Pienso cobrar 2000 por persona por clase. Mis alumnos del taller las tienen incluidas</text:span></text:p>
        </text:list-item>
        <text:list-item>
          <text:p text:style-name="P11"><text:soft-page-break/>¿Qué haces normalmente en la primera clase? <text:span text:style-name="T2">Casi siempre es enseñarles que aún en la versión gratuita tienen muchas herramientas a su disposición, incluidos antigravity y codex</text:span></text:p>
        </text:list-item>
        <text:list-item>
          <text:p text:style-name="P11">¿Tienes una estructura fija o vas improvisando según lo que necesite cada alumno? <text:span text:style-name="T2">Voy improvisando, cada alumno es diferente</text:span></text:p>
        </text:list-item>
        <text:list-item>
          <text:p text:style-name="P11">¿Usas presentaciones, documentos, ejercicios, grabaciones, tareas o solo explicación en vivo? <text:span text:style-name="T2">Nop. Me adapto a cada sesión en tiempo real</text:span></text:p>
        </text:list-item>
        <text:list-item>
          <text:p text:style-name="P11">¿Les dejas tarea? <text:span text:style-name="T2">Si, que sigan experimentando con lo que vimos</text:span></text:p>
        </text:list-item>
        <text:list-item>
          <text:p text:style-name="P11">¿Llevas registro de lo que vio cada alumno? <text:span text:style-name="T2">No ahora, pero creo que el proyecto debe tener una sección de alumnos para personalizar los registros</text:span></text:p>
        </text:list-item>
        <text:list-item>
          <text:p text:style-name="P12">¿Tienes una forma de medir progreso? <text:span text:style-name="T2">No explícita, creo que hay que desarrollarla</text:span></text:p>
        </text:list-item>
      </text:list>
      <text:h text:style-name="P1" text:outline-level="2">4. Qué estás enseñando</text:h>
      <text:list text:style-name="L4">
        <text:list-item>
          <text:p text:style-name="P13">¿Qué herramientas estás enseñando actualmente?<text:line-break/>ChatGPT, Claude, Gemini, NotebookLM, ElevenLabs, Suno, <text:s/>Codex, GitHub, <text:span text:style-name="T2">Antigravity y a los que pagan Claude Code y Cowork</text:span></text:p>
        </text:list-item>
        <text:list-item>
          <text:p text:style-name="P13">¿Qué temas enseñas con más frecuencia? <text:span text:style-name="T2">Agentes, Codex, Cowork y Antigravity</text:span></text:p>
        </text:list-item>
        <text:list-item>
          <text:p text:style-name="P13">¿Qué temas te piden más? <text:span text:style-name="T2">No tienen idea, pero cuando les enseño a usar agentes solos comienzan a generar casos de uso, y normalmente los guío para que aprendan haciendo sus propios proyectos</text:span></text:p>
        </text:list-item>
        <text:list-item>
          <text:p text:style-name="P13">¿Qué temas crees que deberías enseñar pero todavía no has ordenado? <text:span text:style-name="T2">Lo que tienen que ver con administración de empresas, CRM y esas cosas</text:span></text:p>
        </text:list-item>
        <text:list-item>
          <text:p text:style-name="P13">¿Qué cosas explicas muy bien y sientes que ya son parte fuerte de tu método? <text:span text:style-name="T2">Todo lo que hemos mencionado lo uso regularmente y lo domino bastante bien</text:span></text:p>
        </text:list-item>
        <text:list-item>
          <text:p text:style-name="P14">¿Qué cosas todavía explicas de manera medio improvisada? <text:span text:style-name="T2">Todavía no me atrevo a enseñar cómo automatizar procesos de empresas más establecidas. Soy vibe coder, y eso es valiosísimo para mis clientes porque les comparto la experiencia exactamente como la necesitan, pero para cosas más grandes me queda claro que necesito más nivel técnico. Tengo que aprender más. Eso puede contemplarlo el proyecto también</text:span></text:p>
        </text:list-item>
      </text:list>
      <text:h text:style-name="P1" text:outline-level="2">5. Tu método personal</text:h>
      <text:list text:style-name="L5">
        <text:list-item>
          <text:p text:style-name="P15">¿Cuál dirías que es tu ventaja como maestro de IA frente a otros cursos? <text:span text:style-name="T3">Que soy vibe coder, y entiendo lo que se siente no saber nada.</text:span></text:p>
        </text:list-item>
        <text:list-item>
          <text:p text:style-name="P15">¿Qué haces tú que no hace un curso genérico de YouTube? <text:span text:style-name="T3">Youtube busca likes, views, venden una experiencia que no es la real. Siempre son desarrolladores, no vibe coders que se enfrentan como yo a problemas que hay que resolver sin saber nada de código</text:span></text:p>
        </text:list-item>
        <text:list-item>
          <text:p text:style-name="P15">¿Tu enfoque es más filosófico, práctico, técnico, creativo, empresarial, pedagógico o una mezcla? <text:span text:style-name="T3">Mezcla</text:span></text:p>
        </text:list-item>
        <text:list-item>
          <text:p text:style-name="P15">¿Quieres que tu método tenga un nombre? <text:span text:style-name="T3">No</text:span></text:p>
        </text:list-item>
        <text:list-item>
          <text:p text:style-name="P16">¿Quieres que el proyecto se conecte con Storm Studios Learning o prefieres que sea una línea separada? <text:span text:style-name="T3">Separada</text:span></text:p>
        </text:list-item>
      </text:list>
      <text:h text:style-name="P1" text:outline-level="2"><text:soft-page-break/>6. Materiales que necesitamos producir</text:h>
      <text:list text:style-name="L6">
        <text:list-item>
          <text:p text:style-name="P17">¿Qué documentos te gustaría tener dentro del proyecto?<text:line-break/>Por ejemplo: </text:p>
        </text:list-item>
      </text:list>
      <text:p text:style-name="P18">Manual del maestro<text:line-break/>Temario general<text:line-break/>Plan de clase por sesión<text:line-break/>Diagnóstico inicial del alumno<text:line-break/>Rúbricas de avance<text:line-break/>Ejercicios prácticos<text:line-break/>Biblioteca de prompts<text:line-break/>Casos de uso por profesión<text:line-break/>Guiones para videos<text:line-break/>Presentaciones<text:line-break/>Contratos o cartas de servicio<text:line-break/>Reportes de progreso para alumnos premium</text:p>
      <text:p text:style-name="P19">Todos los que creas necesarios</text:p>
      <text:list text:style-name="L7">
        <text:list-item>
          <text:p text:style-name="P20">¿Quieres que Codex organice todo en Markdown, Word, PDF, HTML o una mezcla? <text:span text:style-name="T3">Cada cosa en su lenguaje más propicio para Codex, pero el mismo proyecto lo pueda usar con Antigravity y Cowork o Claude Code. Hago muchísimas cosas en .md por recomendación de todos los podcasts que estudio</text:span></text:p>
        </text:list-item>
        <text:list-item>
          <text:p text:style-name="P20">¿El proyecto será solo para ti o quieres que en el futuro otros maestros puedan usarlo? <text:span text:style-name="T3">Mío</text:span></text:p>
        </text:list-item>
        <text:list-item>
          <text:p text:style-name="P21"><text:span text:style-name="T4">¿Quieres que tenga una estructura tipo repositorio profesional, con carpetas como </text:span><text:span text:style-name="Source_20_Text"><text:span text:style-name="T4">/curriculum</text:span></text:span><text:span text:style-name="T4">, </text:span><text:span text:style-name="Source_20_Text"><text:span text:style-name="T4">/alumnos</text:span></text:span><text:span text:style-name="T4">, </text:span><text:span text:style-name="Source_20_Text"><text:span text:style-name="T4">/clases</text:span></text:span><text:span text:style-name="T4">, </text:span><text:span text:style-name="Source_20_Text"><text:span text:style-name="T4">/prompts</text:span></text:span><text:span text:style-name="T4">, </text:span><text:span text:style-name="Source_20_Text"><text:span text:style-name="T4">/materiales</text:span></text:span><text:span text:style-name="T4">, etc.? </text:span><text:span text:style-name="T5">Sip, <text:s/>y tenerlo en Githug también</text:span></text:p>
        </text:list-item>
      </text:list>
      <text:h text:style-name="P1" text:outline-level="2">7. Producto comercial</text:h>
      <text:list text:style-name="L8">
        <text:list-item>
          <text:p text:style-name="P22">¿Cómo estás vendiendo las clases actualmente? <text:span text:style-name="T3">Word of mouth</text:span></text:p>
        </text:list-item>
        <text:list-item>
          <text:p text:style-name="P22">¿Qué precio estás cobrando o quieres cobrar? <text:span text:style-name="T3">2000 por clase por persona</text:span></text:p>
        </text:list-item>
        <text:list-item>
          <text:p text:style-name="P22">¿Quieres posicionarlo como algo premium? <text:span text:style-name="T3">Nop</text:span></text:p>
        </text:list-item>
        <text:list-item>
          <text:p text:style-name="P22">¿Quieres venderlo a particulares, empresarios, artistas, maestros, estudiantes, adultos mayores, familias o empresas? <text:span text:style-name="T3">A quien se deje, pero siempre es recomendación, no necesito publicidad.</text:span></text:p>
        </text:list-item>
        <text:list-item>
          <text:p text:style-name="P22">¿Qué promesa comercial te gustaría poder decir sin exagerar? <text:span text:style-name="T3">Es más personal que comercial, que quien toma el curso va a potenciar su creatividad y productividad por muuuucho</text:span></text:p>
        </text:list-item>
        <text:list-item>
          <text:p text:style-name="P23">¿Qué cosas NO quieres prometer? <text:span text:style-name="T3">Que hago sistemas de empresas</text:span></text:p>
        </text:list-item>
      </text:list>
      <text:h text:style-name="P1" text:outline-level="2">8. Estilo de enseñanza</text:h>
      <text:list text:style-name="L9">
        <text:list-item>
          <text:p text:style-name="P24">¿Quieres que las clases sean muy estructuradas o adaptativas? <text:span text:style-name="T3">Adaptativas</text:span></text:p>
        </text:list-item>
        <text:list-item>
          <text:p text:style-name="P24">¿Prefieres enseñar desde casos reales del alumno o desde ejercicios diseñados por ti? <text:span text:style-name="T3">Las dos</text:span></text:p>
        </text:list-item>
        <text:list-item>
          <text:p text:style-name="P24"><text:soft-page-break/>¿Qué tono quieres que tengan los materiales?<text:line-break/><text:span text:style-name="T3">Lo que se necesite para que las IAs puedan entenderlos mejor para ayudarme a mí</text:span></text:p>
        </text:list-item>
        <text:list-item>
          <text:p text:style-name="P24">¿Quieres que el alumno sienta que está aprendiendo “herramientas” o que está cambiando su manera de pensar y trabajar? <text:span text:style-name="T3">Ambas</text:span></text:p>
        </text:list-item>
        <text:list-item>
          <text:p text:style-name="P25">¿Qué tanto quieres incluir pensamiento crítico sobre IA, riesgos, ética, límites, privacidad y dependencia tecnológica? <text:span text:style-name="T3">Vamos a incluir en los folders una sección de fuentes. Dentro las primeras dos son el curso de Filosofía y el otro son los resúmenes de noticias de IA que generan diario mis agentes. Pensamiento crítico es lo más importante!</text:span></text:p>
        </text:list-item>
      </text:list>
      <text:h text:style-name="P1" text:outline-level="2">9. Proyecto para Codex</text:h>
      <text:list text:style-name="L10">
        <text:list-item>
          <text:p text:style-name="P26">¿Dónde quieres crear este proyecto?<text:line-break/><text:span text:style-name="T3">En mi disco duro con Github</text:span></text:p>
        </text:list-item>
        <text:list-item>
          <text:p text:style-name="P26">¿Quieres que Codex solo cree documentos o también una pequeña web/app interna para organizar tus clases? <text:span text:style-name="T3">Solo documentos</text:span></text:p>
        </text:list-item>
        <text:list-item>
          <text:p text:style-name="P26">¿Quieres tener plantillas reutilizables para cada nuevo alumno? <text:span text:style-name="T3">Sip</text:span></text:p>
        </text:list-item>
        <text:list-item>
          <text:p text:style-name="P26">¿Quieres que el proyecto tenga una base de datos o por ahora solo archivos ordenados? <text:span text:style-name="T3">Base de datos, si</text:span></text:p>
        </text:list-item>
        <text:list-item>
          <text:p text:style-name="P27">¿Quieres que el resultado final sea algo que puedas usar como sistema de trabajo semanal? <text:span text:style-name="T3">Que pueda consultar siempre, para ideas y para llevar el progreso de los alumnos</text:span></text:p>
        </text:list-item>
      </text:list>
      <text:h text:style-name="P1" text:outline-level="2">Primera respuesta sugerida</text:h>
      <text:p text:style-name="P18">Para avanzar rápido, contéstame primero estas 10 preguntas clave:</text:p>
      <text:list text:style-name="L11">
        <text:list-item>
          <text:p text:style-name="P28">¿A quién le estás dando clases de IA actualmente? <text:span text:style-name="T3">Jonás 12, Cármen 50, Mario 55, Bruno 16, Luis 84, Julio 60</text:span></text:p>
        </text:list-item>
        <text:list-item>
          <text:p text:style-name="P28">¿Qué herramientas estás enseñando? <text:span text:style-name="T3">Codex, Cowork y Gemini en Antigravity, ademas de todas las herramientas de los chats, gratuitas y pagadas</text:span></text:p>
        </text:list-item>
        <text:list-item>
          <text:p text:style-name="P28">¿Cuánto dura cada clase y cuánto cobras? <text:span text:style-name="T3">2 horas, 2000 por clase por persona</text:span></text:p>
        </text:list-item>
        <text:list-item>
          <text:p text:style-name="P28">¿Cómo empieza normalmente una clase contigo? <text:span text:style-name="T3">Les pregunto qué saben</text:span></text:p>
        </text:list-item>
        <text:list-item>
          <text:p text:style-name="P28">¿Qué problemas reales resuelves con tus alumnos? <text:span text:style-name="T3">Sobre todo de organización de proyectos y ayudas para estudio</text:span></text:p>
        </text:list-item>
        <text:list-item>
          <text:p text:style-name="P28">¿Qué materiales usas hoy? <text:span text:style-name="T3">ChatGP, Gemini y Claude y sus agentes, NoteBook LM</text:span></text:p>
        </text:list-item>
        <text:list-item>
          <text:p text:style-name="P28">¿Qué te gustaría profesionalizar primero? <text:span text:style-name="T3">La base de datos</text:span></text:p>
        </text:list-item>
        <text:list-item>
          <text:p text:style-name="P28">¿Quieres que sea un curso, una consultoría o ambas? <text:span text:style-name="T3">Es para mí, pero tiene que tener al final estructura de curso y de consultoría</text:span></text:p>
        </text:list-item>
        <text:list-item>
          <text:p text:style-name="P28">¿Quieres conectar esto con Storm Studios Learning? <text:span text:style-name="T3">Nop</text:span></text:p>
        </text:list-item>
        <text:list-item>
          <text:p text:style-name="P29">¿Quieres que Codex cree solo documentos o también una estructura web/app? <text:span text:style-name="T3">Documentos y estructura de carpetas, con </text:span><text:span text:style-name="T6">mds para instrucciones e índices de todo para que cualquier agente pueda trabajar. En las instrucciones debe haber documentos de memoria y de registro de lo último que se hizo y lo que falta por hacer, para tener una memoria permanente y no depender de las IAs para trabajar en el proyecto.</text:span></text:p>
          <text:p text:style-name="P30"><text:soft-page-break/>Acepto todas tus recomendaciones, tú eres la experta. Yo aprendo. En el camino lo iremos llevando a final feliz</text:p>
          <text:p text:style-name="P29">¿Quieres que el repo esté en español completamente? <text:span text:style-name="T7">Sip</text:span></text:p>
        </text:list-item>
      </text:list>
      <text:list text:style-name="L12">
        <text:list-item>
          <text:p text:style-name="P31">Para cada alumno, ¿quieres una carpeta individual con todo su historial o prefieres que todo viva en tablas generales? <text:span text:style-name="T7">Cada alumno su carpeta, pero que sean legibles para el agente</text:span></text:p>
        </text:list-item>
      </text:list>
      <text:list text:style-name="L13">
        <text:list-item>
          <text:p text:style-name="P32">¿Quieres registrar datos sensibles del alumno o mantenerlo ligero: nombre, edad, intereses, nivel, sesiones y proyectos? <text:span text:style-name="T7">Todo lo que sea relevante</text:span></text:p>
        </text:list-item>
      </text:list>
      <text:list text:style-name="L14">
        <text:list-item>
          <text:p text:style-name="P33">¿Quieres que cada sesión termine con un formato obligatorio de bitácora? <text:span text:style-name="T7">Sip</text:span><text:line-break/></text:p>
        </text:list-item>
      </text:list>
      <text:list text:style-name="L15">
        <text:list-item>
          <text:p text:style-name="P34">¿Quieres que Codex cree archivos reales para tus alumnos actuales: Jonás, Carmen, Mario, Bruno, Luis y Julio? <text:span text:style-name="T7">Sip</text:span></text:p>
        </text:list-item>
      </text:list>
      <text:list text:style-name="L16">
        <text:list-item>
          <text:p text:style-name="P35">¿Quieres que el sistema tenga un documento tipo “qué hacer antes de cada clase” y “qué hacer después de cada clase”? <text:span text:style-name="T7">´Sip</text:span></text:p>
        </text:list-item>
      </text:list>
      <text:list text:style-name="L17">
        <text:list-item>
          <text:p text:style-name="P36">¿Quieres que incluya una carpeta especial para “cosas que Luis debe aprender” sobre automatización, CRM, empresas y procesos más técnicos? <text:span text:style-name="T7">Sip</text:span></text:p>
        </text:list-item>
      </text:list>
      <text:list text:style-name="L18">
        <text:list-item>
          <text:p text:style-name="P37">¿Quieres que el proyecto use nombres sin acentos ni espacios para que GitHub y Codex trabajen más limpio? <text:span text:style-name="T7">sip</text:span><text:line-break/>Ejemplo: <text:span text:style-name="Source_20_Text">carmen_50</text:span>, <text:span text:style-name="Source_20_Text">plan_de_clase.md</text:span>, <text:span text:style-name="Source_20_Text">bitacora_sesion.md</text:span>. </text:p>
        </text:list-item>
      </text:list>
      <text:list text:style-name="L19">
        <text:list-item>
          <text:p text:style-name="P38">¿Quieres que los reportes sean solo para ti o también para mandárselos al alumno? <text:span text:style-name="T7">Solo yo</text:span></text:p>
        </text:list-item>
      </text:list>
      <text:list text:style-name="L20">
        <text:list-item>
          <text:p text:style-name="P39">¿Quieres que el prompt para Codex cree solo la estructura vacía o también documentos iniciales ya escritos con contenido base? <text:span text:style-name="T7">Todo porfa, lo más completo posible. El md que me des lo voy a poner en la carpeta raiz del proyecto <text:s/>que es D:\codex\clases-ia y de ahí Codex lo tiene que leer y ejecutar sin hacer más preguntas</text:span></text:p>
        </text:list-item>
      </text:list>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MX"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07T13:31:08.453984700</meta:creation-date>
    <dc:date>2026-05-07T14:05:39.363234300</dc:date>
    <meta:editing-duration>PT22M3S</meta:editing-duration>
    <meta:editing-cycles>5</meta:editing-cycles>
    <meta:generator>LibreOffice/25.8.5.2$Windows_X86_64 LibreOffice_project/9c8b85f387cc00a89945a79c9e6239f32e450ac2</meta:generator>
    <meta:document-statistic meta:table-count="0" meta:image-count="0" meta:object-count="0" meta:page-count="5" meta:paragraph-count="91" meta:word-count="1785" meta:character-count="10709" meta:non-whitespace-character-count="9071"/>
  </office:meta>
</office:document-meta>
</file>